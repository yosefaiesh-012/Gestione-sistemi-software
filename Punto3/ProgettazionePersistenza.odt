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5C8AA907C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c0fc"/>
    </style:style>
    <style:style style:name="P2" style:family="paragraph" style:parent-style-name="Text_20_body">
      <style:text-properties officeooo:paragraph-rsid="0013c0fc"/>
    </style:style>
    <style:style style:name="P3" style:family="paragraph" style:parent-style-name="Text_20_body">
      <style:text-properties style:font-name="Liberation Serif"/>
    </style:style>
    <style:style style:name="T1" style:family="text">
      <style:text-properties officeooo:rsid="0013c0fc"/>
    </style:style>
    <style:style style:name="T2" style:family="text">
      <style:text-properties fo:font-weight="normal" officeooo:rsid="0013c0fc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c0fc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13c0fc" style:font-weight-asian="normal" style:font-weight-complex="normal"/>
    </style:style>
    <style:style style:name="T8" style:family="text">
      <style:text-properties style:font-name="Liberation Serif" fo:font-style="normal" style:font-style-asian="normal" style:font-style-complex="normal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3c0f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<text:span text:style-name="T1">­</text:span><draw:frame draw:style-name="fr1" draw:name="Immagine1" text:anchor-type="char" svg:x="1.836cm" svg:y="-0.73cm" svg:width="13.645cm" svg:height="29.7cm" draw:z-index="0"><draw:image xlink:href="Pictures/10000001000002A8000005C8AA907C6E.png" xlink:type="simple" xlink:show="embed" xlink:actuate="onLoad" draw:mime-type="image/png"/></draw:frame><text:span text:style-name="T5">I </text:span><text:span text:style-name="T10">f</text:span><text:span text:style-name="Strong_20_Emphasis"><text:span text:style-name="T9">ile</text:span></text:span><text:span text:style-name="Strong_20_Emphasis"><text:span text:style-name="T4"> di </text:span></text:span><text:span text:style-name="Strong_20_Emphasis"><text:span text:style-name="T5">l</text:span></text:span><text:span text:style-name="Strong_20_Emphasis"><text:span text:style-name="T4">og delle Operazioni (es. modifiche a task, progetti, assegnazioni):</text:span></text:span><text:span text:style-name="T4"> </text:span></text:p>
      <text:p text:style-name="Text_20_body"><text:span text:style-name="T4">Seguono il formato: [DataOra]</text:span><text:span text:style-name="Source_20_Text"><text:span text:style-name="T4">[Operazione][Esecutore][Esito] </text:span></text:span></text:p>
      <text:p text:style-name="Text_20_body"><text:span text:style-name="Emphasis"><text:span text:style-name="T4">Esempio pratico:</text:span></text:span><text:span text:style-name="T4"> </text:span></text:p>
      <text:p text:style-name="Text_20_body"><text:span text:style-name="Source_20_Text">2026-05-21T10:30:00 AGGIORNAMENTO_STATO_TASK Sviluppatore_MarioRossi Task_45_Completato</text:span></text:p>
      <text:p text:style-name="Text_20_body"><text:span text:style-name="Source_20_Text"/></text:p>
      <text:p text:style-name="P2"><text:span text:style-name="Strong_20_Emphasis"><text:span text:style-name="T7">I </text:span></text:span><text:span text:style-name="Strong_20_Emphasis"><text:span text:style-name="T5">f</text:span></text:span><text:span text:style-name="Strong_20_Emphasis"><text:span text:style-name="T4">ile di Log di Sicurezza (es. autenticazioni, errori di accesso, blocco account):</text:span></text:span><text:span text:style-name="T4"> </text:span></text:p>
      <text:p text:style-name="Text_20_body"><text:s/><text:span text:style-name="T4">Seguono il formato: [DataOra]</text:span><text:span text:style-name="Source_20_Text"><text:span text:style-name="T4">[Operazione][Utente/IP][Esito]</text:span></text:span><text:span text:style-name="T4"> </text:span></text:p>
      <text:p text:style-name="Text_20_body"><text:span text:style-name="Emphasis"><text:span text:style-name="T4">Esempio pratico:</text:span></text:span></text:p>
      <text:p text:style-name="Text_20_body"><text:span text:style-name="Source_20_Text"><text:span text:style-name="T4">2026-05-21T10:35:00 LOGIN_ATTEMPT User_Admin FALLITO_CREDENZIALI_ERRATE</text:span></text:span></text:p>
      <text:p text:style-name="P3">In questo modo si mantengono i file log leggeri e sequenziali, perfetti per essere analizzati riga per riga in ordine temporale in caso di problemi di sicurezz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1:21:38.715475657</meta:creation-date>
    <dc:date>2026-05-21T11:34:49.861974629</dc:date>
    <meta:editing-duration>PT2M19S</meta:editing-duration>
    <meta:editing-cycles>1</meta:editing-cycles>
    <meta:document-statistic meta:table-count="0" meta:image-count="1" meta:object-count="0" meta:page-count="2" meta:paragraph-count="9" meta:word-count="73" meta:character-count="637" meta:non-whitespace-character-count="568"/>
    <meta:generator>LibreOffice/24.2.7.2$Linux_X86_64 LibreOffice_project/420$Build-2</meta:generator>
  </office:meta>
</office:document-meta>
</file>