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8000005C8A05A06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c0fc"/>
    </style:style>
    <style:style style:name="P2" style:family="paragraph" style:parent-style-name="Text_20_body">
      <style:text-properties officeooo:paragraph-rsid="0013c0fc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text-properties style:font-name="Liberation Serif" officeooo:paragraph-rsid="00176f35"/>
    </style:style>
    <style:style style:name="T1" style:family="text">
      <style:text-properties officeooo:rsid="0013c0f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3c0fc"/>
    </style:style>
    <style:style style:name="T4" style:family="text">
      <style:text-properties style:font-name="Liberation Serif" fo:font-weight="normal" officeooo:rsid="0013c0fc" style:font-weight-asian="normal" style:font-weight-complex="normal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3c0fc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text:span text:style-name="T3">I </text:span><text:span text:style-name="T6">f</text:span><text:span text:style-name="Strong_20_Emphasis"><text:span text:style-name="T5">ile</text:span></text:span><text:span text:style-name="Strong_20_Emphasis"><text:span text:style-name="T2"> di </text:span></text:span><text:span text:style-name="Strong_20_Emphasis"><text:span text:style-name="T3">l</text:span></text:span><text:span text:style-name="Strong_20_Emphasis"><text:span text:style-name="T2">og delle Operazioni (es. modifiche a task, progetti, assegnazioni):</text:span></text:span><text:span text:style-name="T2"> </text:span></text:p>
      <text:p text:style-name="Text_20_body"><text:span text:style-name="T2">Seguono il formato: [DataOra]</text:span><text:span text:style-name="Source_20_Text"><text:span text:style-name="T2">[Operazione][Esecutore][Esito] </text:span></text:span></text:p>
      <text:p text:style-name="Text_20_body"><text:span text:style-name="Emphasis"><text:span text:style-name="T2">Esempio pratico:</text:span></text:span><text:span text:style-name="T2"> </text:span></text:p>
      <text:p text:style-name="Text_20_body"><text:span text:style-name="Source_20_Text">2026-05-21T10:30:00 AGGIORNAMENTO_STATO_TASK Sviluppatore_MarioRossi Task_45_Completato</text:span></text:p>
      <text:p text:style-name="Text_20_body"><text:span text:style-name="Source_20_Text"/></text:p>
      <text:p text:style-name="P2"><text:span text:style-name="Strong_20_Emphasis"><text:span text:style-name="T4">I </text:span></text:span><text:span text:style-name="Strong_20_Emphasis"><text:span text:style-name="T3">f</text:span></text:span><text:span text:style-name="Strong_20_Emphasis"><text:span text:style-name="T2">ile di Log di Sicurezza (es. autenticazioni, errori di accesso, blocco account):</text:span></text:span><text:span text:style-name="T2"> </text:span></text:p>
      <text:p text:style-name="Text_20_body"><text:s/><text:span text:style-name="T2">Seguono il formato: [DataOra]</text:span><text:span text:style-name="Source_20_Text"><text:span text:style-name="T2">[Operazione][Utente/IP][Esito]</text:span></text:span><text:span text:style-name="T2"> </text:span></text:p>
      <text:p text:style-name="Text_20_body"><text:span text:style-name="Emphasis"><text:span text:style-name="T2">Esempio pratico:</text:span></text:span></text:p>
      <text:p text:style-name="Text_20_body"><text:span text:style-name="Source_20_Text"><text:span text:style-name="T2">2026-05-21T10:35:00 LOGIN_ATTEMPT User_Admin FALLITO_CREDENZIALI_ERRATE</text:span></text:span></text:p>
      <text:p text:style-name="P4">In questo modo si mantengono i file log leggeri e sequenziali, perfetti per essere analizzati riga per riga in ordine temporale in caso di problemi di sicurezza.</text:p>
      <text:p text:style-name="P3"><draw:frame draw:style-name="fr1" draw:name="Immagine2" text:anchor-type="char" svg:width="13.645cm" svg:height="29.7cm" draw:z-index="0"><draw:image xlink:href="Pictures/10000001000002A8000005C8A05A062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1:21:38.715475657</meta:creation-date>
    <dc:date>2026-05-23T16:01:59.018168857</dc:date>
    <meta:editing-duration>PT3M47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2" meta:paragraph-count="9" meta:word-count="73" meta:character-count="637" meta:non-whitespace-character-count="568"/>
  </office:meta>
</office:document-meta>
</file>