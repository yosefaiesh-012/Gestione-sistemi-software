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cm" svg:stroke-color="#000000" draw:stroke-linejoin="round" svg:stroke-linecap="butt" draw:fill="solid" draw:fill-color="#000000" loext:decorative="false"/>
    </style:style>
    <style:style style:name="gr3" style:family="graphic" style:parent-style-name="standard">
      <style:graphic-properties draw:stroke="solid" svg:stroke-width="0.002cm" svg:stroke-color="#000000" draw:stroke-linejoin="miter" svg:stroke-linecap="butt" draw:fill="none" fo:padding-top="0.001cm" fo:padding-bottom="0.001cm" fo:padding-left="0.001cm" fo:padding-right="0.001cm" loext:decorative="false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solid" svg:stroke-width="0cm" svg:stroke-color="#000000" draw:stroke-linejoin="round" svg:stroke-linecap="butt" draw:fill="solid" draw:fill-color="#ffffff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stroke-linejoin="round" svg:stroke-linecap="butt" draw:fill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698cm" svg:height="20.998cm" svg:x="0cm" svg:y="0cm" svg:viewBox="0 0 29699 20999" draw:points="0,0 29699,0 29699,20999 0,20999">
          <text:p/>
        </draw:polygon>
        <draw:polygon draw:style-name="gr1" draw:text-style-name="P1" draw:layer="layout" svg:width="29.698cm" svg:height="21cm" svg:x="0cm" svg:y="0cm" svg:viewBox="0 0 29699 21001" draw:points="0,0 29699,0 29699,21001 0,21001">
          <text:p/>
        </draw:polygon>
        <draw:path draw:style-name="gr2" draw:text-style-name="P2" draw:layer="layout" svg:width="1.002cm" svg:height="1.003cm" svg:x="1.249cm" svg:y="4.249cm" svg:viewBox="0 0 1003 1004" svg:d="M1003 503c0 88-23 175-67 251-45 75-106 139-184 182-75 45-162 68-248 68-90 0-177-23-253-68-78-43-139-107-184-182-44-76-67-163-67-251 0-87 23-174 67-252 45-76 106-139 184-183 76-45 163-68 250-68 89 0 176 23 251 68 78 44 139 107 184 183 44 78 67 165 67 252z">
          <text:p/>
        </draw:path>
        <draw:line draw:style-name="gr3" draw:text-style-name="P3" draw:layer="layout" svg:x1="2.25cm" svg:y1="4.75cm" svg:x2="6.22cm" svg:y2="4.75cm">
          <text:p/>
        </draw:line>
        <draw:polygon draw:style-name="gr4" draw:text-style-name="P2" draw:layer="layout" svg:width="0.301cm" svg:height="0.301cm" svg:x="6.199cm" svg:y="4.6cm" svg:viewBox="0 0 302 302" draw:points="0,0 302,152 0,302">
          <text:p/>
        </draw:polygon>
        <draw:polygon draw:style-name="gr5" draw:text-style-name="P1" draw:layer="layout" svg:width="3.001cm" svg:height="1.752cm" svg:x="6.5cm" svg:y="3.75cm" svg:viewBox="0 0 3002 1753" draw:points="0,0 3002,0 3002,1753 0,1753">
          <text:p/>
        </draw:polygon>
        <draw:line draw:style-name="gr3" draw:text-style-name="P3" draw:layer="layout" svg:x1="9.499cm" svg:y1="4.5cm" svg:x2="13.47cm" svg:y2="4.5cm">
          <text:p/>
        </draw:line>
        <draw:polygon draw:style-name="gr4" draw:text-style-name="P2" draw:layer="layout" svg:width="0.3cm" svg:height="0.3cm" svg:x="13.45cm" svg:y="4.35cm" svg:viewBox="0 0 301 301" draw:points="0,0 301,150 0,301">
          <text:p/>
        </draw:polygon>
        <draw:polygon draw:style-name="gr5" draw:text-style-name="P1" draw:layer="layout" svg:width="7.75cm" svg:height="2.501cm" svg:x="13.75cm" svg:y="3.5cm" svg:viewBox="0 0 7751 2502" draw:points="3874,2502 0,2502 0,0 7751,0 7751,2502">
          <text:p/>
        </draw:polygon>
        <draw:frame draw:style-name="gr6" draw:text-style-name="P5" draw:layer="layout" svg:width="2.081cm" svg:height="0.712cm" svg:x="6.96cm" svg:y="4.271cm">
          <draw:text-box>
            <text:p text:style-name="P4"><text:span text:style-name="T1">Da fare</text:span></text:p>
          </draw:text-box>
        </draw:frame>
        <draw:frame draw:style-name="gr6" draw:text-style-name="P5" draw:layer="layout" svg:width="1.907cm" svg:height="0.712cm" svg:x="2.539cm" svg:y="3.877cm">
          <draw:text-box>
            <text:p text:style-name="P4"><text:span text:style-name="T1">Create</text:span></text:p>
          </draw:text-box>
        </draw:frame>
        <draw:polygon draw:style-name="gr5" draw:text-style-name="P1" draw:layer="layout" svg:width="8.25cm" svg:height="2.751cm" svg:x="13.499cm" svg:y="9.75cm" svg:viewBox="0 0 8251 2752" draw:points="4125,2752 0,2752 0,0 8251,0 8251,2752">
          <text:p/>
        </draw:polygon>
        <draw:frame draw:style-name="gr6" draw:text-style-name="P5" draw:layer="layout" svg:width="2.398cm" svg:height="0.712cm" svg:x="16.426cm" svg:y="4.396cm">
          <draw:text-box>
            <text:p text:style-name="P4"><text:span text:style-name="T1">In Corso</text:span></text:p>
          </draw:text-box>
        </draw:frame>
        <draw:line draw:style-name="gr3" draw:text-style-name="P3" draw:layer="layout" svg:x1="15.999cm" svg:y1="6cm" svg:x2="15.999cm" svg:y2="9.47cm">
          <text:p/>
        </draw:line>
        <draw:polygon draw:style-name="gr4" draw:text-style-name="P2" draw:layer="layout" svg:width="0.3cm" svg:height="0.3cm" svg:x="15.849cm" svg:y="9.45cm" svg:viewBox="0 0 301 301" draw:points="301,0 150,301 0,0">
          <text:p/>
        </draw:polygon>
        <draw:frame draw:style-name="gr6" draw:text-style-name="P5" draw:layer="layout" svg:width="3.778cm" svg:height="0.712cm" svg:x="10cm" svg:y="3.704cm">
          <draw:text-box>
            <text:p text:style-name="P4"><text:span text:style-name="T1">assegnaTask</text:span></text:p>
          </draw:text-box>
        </draw:frame>
        <draw:line draw:style-name="gr3" draw:text-style-name="P3" draw:layer="layout" svg:x1="19cm" svg:y1="9.75cm" svg:x2="19cm" svg:y2="6.28cm">
          <text:p/>
        </draw:line>
        <draw:polygon draw:style-name="gr4" draw:text-style-name="P2" draw:layer="layout" svg:width="0.301cm" svg:height="0.301cm" svg:x="18.85cm" svg:y="6cm" svg:viewBox="0 0 302 302" draw:points="0,302 150,0 302,302">
          <text:p/>
        </draw:polygon>
        <draw:frame draw:style-name="gr6" draw:text-style-name="P5" draw:layer="layout" svg:width="3.249cm" svg:height="0.712cm" svg:x="16.001cm" svg:y="10.771cm">
          <draw:text-box>
            <text:p text:style-name="P4"><text:span text:style-name="T1">Completato</text:span></text:p>
          </draw:text-box>
        </draw:frame>
        <draw:polygon draw:style-name="gr5" draw:text-style-name="P1" draw:layer="layout" svg:width="7.999cm" svg:height="3.252cm" svg:x="13.75cm" svg:y="15.249cm" svg:viewBox="0 0 8000 3253" draw:points="4000,3253 0,3253 0,0 8000,0 8000,3253">
          <text:p/>
        </draw:polygon>
        <draw:frame draw:style-name="gr6" draw:text-style-name="P5" draw:layer="layout" svg:width="6.813cm" svg:height="0.712cm" svg:x="8.937cm" svg:y="7.377cm">
          <draw:text-box>
            <text:p text:style-name="P4"><text:span text:style-name="T1">SegnalaCompletamento</text:span></text:p>
          </draw:text-box>
        </draw:frame>
        <draw:line draw:style-name="gr3" draw:text-style-name="P3" draw:layer="layout" svg:x1="17.5cm" svg:y1="12.5cm" svg:x2="17.5cm" svg:y2="14.969cm">
          <text:p/>
        </draw:line>
        <draw:polygon draw:style-name="gr4" draw:text-style-name="P2" draw:layer="layout" svg:width="0.301cm" svg:height="0.301cm" svg:x="17.349cm" svg:y="14.95cm" svg:viewBox="0 0 302 302" draw:points="302,0 151,302 0,0">
          <text:p/>
        </draw:polygon>
        <draw:frame draw:style-name="gr6" draw:text-style-name="P5" draw:layer="layout" svg:width="2.965cm" svg:height="0.712cm" svg:x="19.285cm" svg:y="7.454cm">
          <draw:text-box>
            <text:p text:style-name="P4"><text:span text:style-name="T1">Riapertura</text:span></text:p>
          </draw:text-box>
        </draw:frame>
        <draw:line draw:style-name="gr3" draw:text-style-name="P3" draw:layer="layout" svg:x1="21.748cm" svg:y1="16.75cm" svg:x2="25.469cm" svg:y2="16.75cm">
          <text:p/>
        </draw:line>
        <draw:polygon draw:style-name="gr4" draw:text-style-name="P2" draw:layer="layout" svg:width="0.3cm" svg:height="0.3cm" svg:x="25.449cm" svg:y="16.6cm" svg:viewBox="0 0 301 301" draw:points="0,0 301,151 0,301">
          <text:p/>
        </draw:polygon>
        <draw:path draw:style-name="gr5" draw:text-style-name="P1" draw:layer="layout" svg:width="2.003cm" svg:height="2.002cm" svg:x="25.749cm" svg:y="15.731cm" svg:viewBox="0 0 2004 2003" svg:d="M2004 981c0 176-46 352-136 506-86 153-213 282-366 373-150 89-325 140-501 143s-349-40-502-126c-150-84-277-208-364-358-89-151-135-324-135-500s46-349 135-503c87-154 214-282 364-373 153-91 326-140 502-143s351 40 501 124c153 86 280 210 366 360 90 151 136 321 136 497z">
          <text:p/>
        </draw:path>
        <draw:path draw:style-name="gr2" draw:text-style-name="P2" draw:layer="layout" svg:width="1.002cm" svg:height="1.002cm" svg:x="26.248cm" svg:y="16.25cm" svg:viewBox="0 0 1003 1003" svg:d="M1003 503c0 87-23 174-67 249-43 77-107 140-182 184-77 44-164 67-251 67-86 0-175-23-252-67-75-44-138-107-182-184-46-75-69-162-69-249 0-89 23-175 69-253 44-76 107-140 182-183 77-44 166-67 252-67 87 0 174 23 251 67 75 43 139 107 182 183 44 78 67 164 67 253z">
          <text:p/>
        </draw:path>
        <draw:line draw:style-name="gr7" draw:text-style-name="P3" draw:layer="layout" svg:x1="13.499cm" svg:y1="11.25cm" svg:x2="8cm" svg:y2="11.25cm">
          <text:p/>
        </draw:line>
        <draw:line draw:style-name="gr3" draw:text-style-name="P3" draw:layer="layout" svg:x1="8cm" svg:y1="11.25cm" svg:x2="8cm" svg:y2="5.78cm">
          <text:p/>
        </draw:line>
        <draw:polygon draw:style-name="gr4" draw:text-style-name="P2" draw:layer="layout" svg:width="0.301cm" svg:height="0.301cm" svg:x="7.85cm" svg:y="5.5cm" svg:viewBox="0 0 302 302" draw:points="0,302 151,0 302,302">
          <text:p/>
        </draw:polygon>
        <draw:frame draw:style-name="gr6" draw:text-style-name="P5" draw:layer="layout" svg:width="2.296cm" svg:height="0.712cm" svg:x="16.627cm" svg:y="16.521cm">
          <draw:text-box>
            <text:p text:style-name="P4"><text:span text:style-name="T1">Validato</text:span></text:p>
          </draw:text-box>
        </draw:frame>
        <draw:frame draw:style-name="gr6" draw:text-style-name="P5" draw:layer="layout" svg:width="3.495cm" svg:height="0.712cm" svg:x="13.75cm" svg:y="13.627cm">
          <draw:text-box>
            <text:p text:style-name="P4"><text:span text:style-name="T1">VerificaTask</text:span></text:p>
          </draw:text-box>
        </draw:frame>
        <draw:frame draw:style-name="gr6" draw:text-style-name="P5" draw:layer="layout" svg:width="3.177cm" svg:height="0.712cm" svg:x="4.5cm" svg:y="8.127cm">
          <draw:text-box>
            <text:p text:style-name="P4"><text:span text:style-name="T1">RifiutaTask</text:span></text:p>
          </draw:text-box>
        </draw:frame>
        <draw:frame draw:style-name="gr6" draw:text-style-name="P5" draw:layer="layout" svg:width="2.153cm" svg:height="0.712cm" svg:x="4.5cm" svg:y="8.838cm">
          <draw:text-box>
            <text:p text:style-name="P4"><text:span text:style-name="T1">[Tester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cm" fo:page-height="2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5T18:24:45.795642877</dc:date>
    <meta:editing-duration>PT46S</meta:editing-duration>
    <meta:editing-cycles>1</meta:editing-cycles>
    <meta:document-statistic meta:object-count="35"/>
    <meta:generator>LibreOffice/24.2.7.2$Linux_X86_64 LibreOffice_project/420$Build-2</meta:generator>
  </office:meta>
</office:document-meta>
</file>