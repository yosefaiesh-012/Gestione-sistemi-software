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cm" svg:stroke-color="#000000" draw:stroke-linejoin="round" svg:stroke-linecap="butt" draw:fill="solid" draw:fill-color="#000000" loext:decorative="false"/>
    </style:style>
    <style:style style:name="gr3" style:family="graphic" style:parent-style-name="standard">
      <style:graphic-properties draw:stroke="solid" svg:stroke-width="0.002cm" svg:stroke-color="#000000" draw:stroke-linejoin="miter" svg:stroke-linecap="butt" draw:fill="none" fo:padding-top="0.001cm" fo:padding-bottom="0.001cm" fo:padding-left="0.001cm" fo:padding-right="0.001cm" loext:decorative="false"/>
    </style:style>
    <style:style style:name="gr4" style:family="graphic" style:parent-style-name="standard">
      <style:graphic-properties draw:stroke="solid" svg:stroke-width="0cm" svg:stroke-color="#000000" draw:stroke-linejoin="round" svg:stroke-linecap="butt" draw:fill="solid" draw:fill-color="#ffffff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000000" loext:decorative="false"/>
    </style:style>
    <style:style style:name="gr7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loext:opacity="100%" style:font-name="Liberation Sans" fo:font-size="18pt" fo:font-weight="normal" style:font-name-asian="Liberation Sans" style:font-size-asian="18pt" style:font-weight-asian="normal" style:font-name-complex="Liberation Sans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698cm" svg:height="20.998cm" svg:x="0cm" svg:y="0cm" svg:viewBox="0 0 29699 20999" draw:points="0,0 29699,0 29699,20999 0,20999">
          <text:p/>
        </draw:polygon>
        <draw:polygon draw:style-name="gr1" draw:text-style-name="P1" draw:layer="layout" svg:width="29.7cm" svg:height="21cm" svg:x="0cm" svg:y="0.055cm" svg:viewBox="0 0 29701 21001" draw:points="0,0 29701,0 29701,21001 0,21001">
          <text:p/>
        </draw:polygon>
        <draw:path draw:style-name="gr2" draw:text-style-name="P2" draw:layer="layout" svg:width="1.002cm" svg:height="1.003cm" svg:x="-0.003cm" svg:y="4.249cm" svg:viewBox="0 0 1003 1004" svg:d="M1003 503c0 88-23 175-67 251-44 75-107 139-184 182-74 45-162 68-250 68-89 0-176-23-251-68-78-43-139-107-185-182-43-76-66-163-66-251 0-87 23-174 66-252 46-76 107-139 185-183 75-45 162-68 250-68 89 0 177 23 251 68 77 44 140 107 184 183 44 78 67 165 67 252z">
          <text:p/>
        </draw:path>
        <draw:line draw:style-name="gr3" draw:text-style-name="P3" draw:layer="layout" svg:x1="10.999cm" svg:y1="6cm" svg:x2="14.971cm" svg:y2="6cm">
          <text:p/>
        </draw:line>
        <draw:polygon draw:style-name="gr4" draw:text-style-name="P1" draw:layer="layout" svg:width="7.752cm" svg:height="2.501cm" svg:x="20.499cm" svg:y="3.75cm" svg:viewBox="0 0 7753 2502" draw:points="3875,2502 0,2502 0,0 7753,0 7753,2502">
          <text:p/>
        </draw:polygon>
        <draw:polygon draw:style-name="gr4" draw:text-style-name="P1" draw:layer="layout" svg:width="7.752cm" svg:height="2.5cm" svg:x="5.749cm" svg:y="3.749cm" svg:viewBox="0 0 7753 2501" draw:points="3874,2501 0,2501 0,0 7753,0 7753,2501">
          <text:p/>
        </draw:polygon>
        <draw:frame draw:style-name="gr5" draw:text-style-name="P5" draw:layer="layout" svg:width="3.778cm" svg:height="0.712cm" svg:x="1.414cm" svg:y="3.828cm">
          <draw:text-box>
            <text:p text:style-name="P4"><text:span text:style-name="T1">CreaProgetto</text:span></text:p>
          </draw:text-box>
        </draw:frame>
        <draw:frame draw:style-name="gr5" draw:text-style-name="P5" draw:layer="layout" svg:width="4.168cm" svg:height="0.712cm" svg:x="7.582cm" svg:y="4.751cm">
          <draw:text-box>
            <text:p text:style-name="P4"><text:span text:style-name="T1">In Lavorazione</text:span></text:p>
          </draw:text-box>
        </draw:frame>
        <draw:path draw:style-name="gr4" draw:text-style-name="P1" draw:layer="layout" svg:width="2.003cm" svg:height="2.003cm" svg:x="23.249cm" svg:y="14.247cm" svg:viewBox="0 0 2004 2004" svg:d="M2004 984c0 176-46 350-135 504-88 154-213 282-367 372-151 91-324 141-500 144s-350-40-502-125c-151-85-278-209-364-359-90-151-136-324-136-500s46-350 136-503c86-154 213-283 364-373 152-92 326-141 502-144s349 41 500 126c154 85 279 209 367 359 89 150 135 323 135 499z">
          <text:p/>
        </draw:path>
        <draw:path draw:style-name="gr6" draw:text-style-name="P2" draw:layer="layout" svg:width="1.002cm" svg:height="1.001cm" svg:x="23.748cm" svg:y="14.75cm" svg:viewBox="0 0 1003 1002" svg:d="M1003 502c0 86-23 173-67 250-43 77-107 140-183 184-77 43-164 66-251 66-88 0-175-23-253-66-75-44-138-107-182-184s-67-164-67-250c0-88 23-175 67-252 44-76 107-139 182-184 78-43 165-66 253-66 87 0 174 23 251 66 76 45 140 108 183 184 44 77 67 164 67 252z">
          <text:p/>
        </draw:path>
        <draw:line draw:style-name="gr7" draw:text-style-name="P3" draw:layer="layout" svg:x1="10cm" svg:y1="6.249cm" svg:x2="10cm" svg:y2="9.219cm">
          <text:p/>
        </draw:line>
        <draw:polygon draw:style-name="gr6" draw:text-style-name="P2" draw:layer="layout" svg:width="0.3cm" svg:height="0.3cm" svg:x="9.85cm" svg:y="9.199cm" svg:viewBox="0 0 301 301" draw:points="301,0 150,301 0,0">
          <text:p/>
        </draw:polygon>
        <draw:polygon draw:style-name="gr4" draw:text-style-name="P1" draw:layer="layout" svg:width="7.752cm" svg:height="3cm" svg:x="20.499cm" svg:y="9.25cm" svg:viewBox="0 0 7753 3001" draw:points="3875,3001 0,3001 0,0 7753,0 7753,3001">
          <text:p/>
        </draw:polygon>
        <draw:polygon draw:style-name="gr4" draw:text-style-name="P1" draw:layer="layout" svg:width="7.752cm" svg:height="2.502cm" svg:x="5.998cm" svg:y="9.499cm" svg:viewBox="0 0 7753 2503" draw:points="3875,2503 0,2503 0,0 7753,0 7753,2503">
          <text:p/>
        </draw:polygon>
        <draw:frame draw:style-name="gr5" draw:text-style-name="P5" draw:layer="layout" svg:width="5.048cm" svg:height="0.712cm" svg:x="14.452cm" svg:y="3.501cm">
          <draw:text-box>
            <text:p text:style-name="P4"><text:span text:style-name="T1">SospendiProgetto</text:span></text:p>
          </draw:text-box>
        </draw:frame>
        <draw:frame draw:style-name="gr5" draw:text-style-name="P5" draw:layer="layout" svg:width="2.47cm" svg:height="0.712cm" svg:x="23.03cm" svg:y="4.751cm">
          <draw:text-box>
            <text:p text:style-name="P4"><text:span text:style-name="T1">Sospeso</text:span></text:p>
          </draw:text-box>
        </draw:frame>
        <draw:frame draw:style-name="gr5" draw:text-style-name="P5" draw:layer="layout" svg:width="4.519cm" svg:height="0.712cm" svg:x="14.75cm" svg:y="6.039cm">
          <draw:text-box>
            <text:p text:style-name="P4"><text:span text:style-name="T1">RiattivaProgetto</text:span></text:p>
          </draw:text-box>
        </draw:frame>
        <draw:frame draw:style-name="gr5" draw:text-style-name="P5" draw:layer="layout" svg:width="1.975cm" svg:height="0.712cm" svg:x="8.775cm" svg:y="10.789cm">
          <draw:text-box>
            <text:p text:style-name="P4"><text:span text:style-name="T1">Chiuso</text:span></text:p>
          </draw:text-box>
        </draw:frame>
        <draw:line draw:style-name="gr7" draw:text-style-name="P3" draw:layer="layout" svg:x1="0.999cm" svg:y1="4.75cm" svg:x2="5.469cm" svg:y2="4.75cm">
          <text:p/>
        </draw:line>
        <draw:polygon draw:style-name="gr6" draw:text-style-name="P2" draw:layer="layout" svg:width="0.3cm" svg:height="0.3cm" svg:x="5.449cm" svg:y="4.6cm" svg:viewBox="0 0 301 301" draw:points="0,0 301,151 0,301">
          <text:p/>
        </draw:polygon>
        <draw:line draw:style-name="gr7" draw:text-style-name="P3" draw:layer="layout" svg:x1="13.499cm" svg:y1="4.5cm" svg:x2="20.219cm" svg:y2="4.5cm">
          <text:p/>
        </draw:line>
        <draw:polygon draw:style-name="gr6" draw:text-style-name="P2" draw:layer="layout" svg:width="0.3cm" svg:height="0.3cm" svg:x="20.199cm" svg:y="4.35cm" svg:viewBox="0 0 301 301" draw:points="0,0 301,150 0,301">
          <text:p/>
        </draw:polygon>
        <draw:line draw:style-name="gr7" draw:text-style-name="P3" draw:layer="layout" svg:x1="20.499cm" svg:y1="5.75cm" svg:x2="13.779cm" svg:y2="5.75cm">
          <text:p/>
        </draw:line>
        <draw:polygon draw:style-name="gr6" draw:text-style-name="P2" draw:layer="layout" svg:width="0.3cm" svg:height="0.3cm" svg:x="13.499cm" svg:y="5.6cm" svg:viewBox="0 0 301 301" draw:points="301,301 0,150 301,0">
          <text:p/>
        </draw:polygon>
        <draw:line draw:style-name="gr7" draw:text-style-name="P3" draw:layer="layout" svg:x1="13.75cm" svg:y1="10.749cm" svg:x2="20.219cm" svg:y2="10.749cm">
          <text:p/>
        </draw:line>
        <draw:polygon draw:style-name="gr6" draw:text-style-name="P2" draw:layer="layout" svg:width="0.3cm" svg:height="0.3cm" svg:x="20.199cm" svg:y="10.599cm" svg:viewBox="0 0 301 301" draw:points="0,0 301,151 0,301">
          <text:p/>
        </draw:polygon>
        <draw:frame draw:style-name="gr5" draw:text-style-name="P5" draw:layer="layout" svg:width="2.788cm" svg:height="0.712cm" svg:x="22.712cm" svg:y="10.539cm">
          <draw:text-box>
            <text:p text:style-name="P4"><text:span text:style-name="T1">Archiviato</text:span></text:p>
          </draw:text-box>
        </draw:frame>
        <draw:frame draw:style-name="gr5" draw:text-style-name="P5" draw:layer="layout" svg:width="4.201cm" svg:height="0.712cm" svg:x="4.049cm" svg:y="6.789cm">
          <draw:text-box>
            <text:p text:style-name="P4"><text:span text:style-name="T1">ChiudiProgetto</text:span></text:p>
          </draw:text-box>
        </draw:frame>
        <draw:frame draw:style-name="gr5" draw:text-style-name="P5" draw:layer="layout" svg:width="4.659cm" svg:height="0.712cm" svg:x="14.75cm" svg:y="10.001cm">
          <draw:text-box>
            <text:p text:style-name="P4"><text:span text:style-name="T1">ArchiviaProgetto</text:span></text:p>
          </draw:text-box>
        </draw:frame>
        <draw:frame draw:style-name="gr5" draw:text-style-name="P5" draw:layer="layout" svg:width="3.495cm" svg:height="0.712cm" svg:x="4.25cm" svg:y="7.751cm">
          <draw:text-box>
            <text:p text:style-name="P4"><text:span text:style-name="T1">[Task e bug </text:span></text:p>
          </draw:text-box>
        </draw:frame>
        <draw:line draw:style-name="gr7" draw:text-style-name="P3" draw:layer="layout" svg:x1="24.25cm" svg:y1="12.25cm" svg:x2="24.25cm" svg:y2="13.97cm">
          <text:p/>
        </draw:line>
        <draw:polygon draw:style-name="gr6" draw:text-style-name="P2" draw:layer="layout" svg:width="0.3cm" svg:height="0.3cm" svg:x="24.1cm" svg:y="13.95cm" svg:viewBox="0 0 301 301" draw:points="301,0 151,301 0,0">
          <text:p/>
        </draw:polygon>
        <draw:frame draw:style-name="gr5" draw:text-style-name="P5" draw:layer="layout" svg:width="5.222cm" svg:height="0.712cm" svg:x="4.25cm" svg:y="8.462cm">
          <draw:text-box>
            <text:p text:style-name="P4"><text:span text:style-name="T1">completati/validati]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cm" fo:page-height="20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33"/>
    <meta:generator>LibreOffice/24.2.7.2$Linux_X86_64 LibreOffice_project/420$Build-2</meta:generator>
  </office:meta>
</office:document-meta>
</file>